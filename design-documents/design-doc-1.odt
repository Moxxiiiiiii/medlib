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4c613" officeooo:paragraph-rsid="0014c613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14c613" officeooo:paragraph-rsid="0014c613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2pt" officeooo:rsid="0014c613" officeooo:paragraph-rsid="0014c613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62d6a" officeooo:paragraph-rsid="00162d6a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7e69a" officeooo:paragraph-rsid="0017e69a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86145" officeooo:paragraph-rsid="00186145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7e69a" officeooo:paragraph-rsid="00186145" style:font-size-asian="10.5pt" style:font-size-complex="12pt"/>
    </style:style>
    <style:style style:name="T1" style:family="text">
      <style:text-properties officeooo:rsid="001861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ML Accessible Medical DB</text:p>
      <text:p text:style-name="P2"/>
      <text:p text:style-name="P3">Framework:</text:p>
      <text:p text:style-name="P4">Node/NPM, SQL.js</text:p>
      <text:p text:style-name="P5">AWS: </text:p>
      <text:p text:style-name="P4"/>
      <text:p text:style-name="P4">Goals of application:</text:p>
      <text:p text:style-name="P4">UX needs to be user friendly, needs to function by search.</text:p>
      <text:p text:style-name="P4">Sort the medications out by tags applied to them within the .db</text:p>
      <text:p text:style-name="P4">2 Users, one for adminitstrative search, one for employee.</text:p>
      <text:p text:style-name="P5">Seasonal Recommendations</text:p>
      <text:p text:style-name="P5"/>
      <text:p text:style-name="P5">Necessary functions:<text:line-break/>Login Logout / Authentication</text:p>
      <text:p text:style-name="P6">Session Tokens</text:p>
      <text:p text:style-name="P6">Search Bar, Tag Search,</text:p>
      <text:p text:style-name="P7">AI-Integration <text:span text:style-name="T1">for chatbot for support.</text:span></text:p>
      <text:p text:style-name="P6">Cookie Warning</text:p>
      <text:p text:style-name="P5"/>
      <text:p text:style-name="P6">First steps:<text:line-break/>Create a HTML and style body front end so that back end can be integrated and created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17T16:15:58.619676721</meta:creation-date>
    <dc:date>2026-05-17T19:05:36.460604367</dc:date>
    <meta:editing-duration>PT1H41M9S</meta:editing-duration>
    <meta:editing-cycles>2</meta:editing-cycles>
    <meta:generator>LibreOffice/25.8.7.3$Linux_X86_64 LibreOffice_project/86b09991d16243f9209a07fafcdf2f8cdb0ad329</meta:generator>
    <meta:document-statistic meta:table-count="0" meta:image-count="0" meta:object-count="0" meta:page-count="1" meta:paragraph-count="15" meta:word-count="83" meta:character-count="520" meta:non-whitespace-character-count="451"/>
  </office:meta>
</office:document-meta>
</file>